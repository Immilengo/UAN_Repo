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eb4e" officeooo:paragraph-rsid="0004eb4e"/>
    </style:style>
    <style:style style:name="P2" style:family="paragraph" style:parent-style-name="Heading_20_1">
      <style:text-properties officeooo:rsid="0006a30a" officeooo:paragraph-rsid="0006a30a"/>
    </style:style>
    <style:style style:name="P3" style:family="paragraph" style:parent-style-name="Heading_20_2">
      <style:text-properties officeooo:rsid="0006a30a" officeooo:paragraph-rsid="0006a30a"/>
    </style:style>
    <style:style style:name="P4" style:family="paragraph" style:parent-style-name="Standard">
      <style:text-properties officeooo:rsid="0002191e" officeooo:paragraph-rsid="0004eb4e"/>
    </style:style>
    <style:style style:name="P5" style:family="paragraph" style:parent-style-name="Standard">
      <style:text-properties officeooo:rsid="0003398d" officeooo:paragraph-rsid="0003398d"/>
    </style:style>
    <style:style style:name="P6" style:family="paragraph" style:parent-style-name="Standard">
      <style:text-properties officeooo:rsid="0003398d" officeooo:paragraph-rsid="0004eb4e"/>
    </style:style>
    <style:style style:name="P7" style:family="paragraph" style:parent-style-name="Standard">
      <style:text-properties officeooo:rsid="0004eb4e" officeooo:paragraph-rsid="0004eb4e"/>
    </style:style>
    <style:style style:name="P8" style:family="paragraph" style:parent-style-name="Standard">
      <style:text-properties officeooo:rsid="0006a30a" officeooo:paragraph-rsid="0006a30a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P44" style:family="paragraph" style:parent-style-name="Text_20_body" style:list-style-name="L19"/>
    <style:style style:name="P45" style:family="paragraph" style:parent-style-name="Text_20_body" style:list-style-name="L19">
      <style:paragraph-properties fo:margin-top="0cm" fo:margin-bottom="0cm" style:contextual-spacing="false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 style:list-style-name="L24"/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5"/>
    <style:style style:name="P57" style:family="paragraph" style:parent-style-name="Text_20_body" style:list-style-name="L25">
      <style:paragraph-properties fo:margin-top="0cm" fo:margin-bottom="0cm" style:contextual-spacing="false"/>
    </style:style>
    <style:style style:name="P58" style:family="paragraph" style:parent-style-name="Text_20_body" style:list-style-name="L26"/>
    <style:style style:name="P59" style:family="paragraph" style:parent-style-name="Text_20_body" style:list-style-name="L26">
      <style:paragraph-properties fo:margin-top="0cm" fo:margin-bottom="0cm" style:contextual-spacing="false"/>
    </style:style>
    <style:style style:name="P60" style:family="paragraph" style:parent-style-name="Text_20_body" style:list-style-name="L27"/>
    <style:style style:name="P61" style:family="paragraph" style:parent-style-name="Text_20_body" style:list-style-name="L27">
      <style:paragraph-properties fo:margin-top="0cm" fo:margin-bottom="0cm" style:contextual-spacing="false"/>
    </style:style>
    <style:style style:name="P62" style:family="paragraph" style:parent-style-name="Text_20_body" style:list-style-name="L28"/>
    <style:style style:name="P63" style:family="paragraph" style:parent-style-name="Text_20_body" style:list-style-name="L28">
      <style:paragraph-properties fo:margin-top="0cm" fo:margin-bottom="0cm" style:contextual-spacing="false"/>
    </style:style>
    <style:style style:name="P64" style:family="paragraph" style:parent-style-name="Text_20_body" style:list-style-name="L29"/>
    <style:style style:name="P65" style:family="paragraph" style:parent-style-name="Text_20_body" style:list-style-name="L29">
      <style:paragraph-properties fo:margin-top="0cm" fo:margin-bottom="0cm" style:contextual-spacing="false"/>
    </style:style>
    <style:style style:name="P66" style:family="paragraph" style:parent-style-name="Text_20_body" style:list-style-name="L30"/>
    <style:style style:name="P67" style:family="paragraph" style:parent-style-name="Text_20_body" style:list-style-name="L30">
      <style:paragraph-properties fo:margin-top="0cm" fo:margin-bottom="0cm" style:contextual-spacing="false"/>
    </style:style>
    <style:style style:name="P68" style:family="paragraph" style:parent-style-name="Text_20_body" style:list-style-name="L31"/>
    <style:style style:name="P69" style:family="paragraph" style:parent-style-name="Text_20_body" style:list-style-name="L31">
      <style:paragraph-properties fo:margin-top="0cm" fo:margin-bottom="0cm" style:contextual-spacing="false"/>
    </style:style>
    <style:style style:name="P70" style:family="paragraph" style:parent-style-name="Text_20_body" style:list-style-name="L32"/>
    <style:style style:name="P71" style:family="paragraph" style:parent-style-name="Text_20_body" style:list-style-name="L32">
      <style:paragraph-properties fo:margin-top="0cm" fo:margin-bottom="0cm" style:contextual-spacing="false"/>
    </style:style>
    <style:style style:name="P72" style:family="paragraph" style:parent-style-name="Text_20_body" style:list-style-name="L33"/>
    <style:style style:name="P73" style:family="paragraph" style:parent-style-name="Text_20_body" style:list-style-name="L33">
      <style:paragraph-properties fo:margin-top="0cm" fo:margin-bottom="0cm" style:contextual-spacing="false"/>
    </style:style>
    <style:style style:name="P74" style:family="paragraph" style:parent-style-name="Text_20_body" style:list-style-name="L34"/>
    <style:style style:name="P75" style:family="paragraph" style:parent-style-name="Text_20_body" style:list-style-name="L34">
      <style:paragraph-properties fo:margin-top="0cm" fo:margin-bottom="0cm" style:contextual-spacing="false"/>
    </style:style>
    <style:style style:name="P76" style:family="paragraph" style:parent-style-name="Text_20_body" style:list-style-name="L35"/>
    <style:style style:name="P77" style:family="paragraph" style:parent-style-name="Text_20_body" style:list-style-name="L35">
      <style:paragraph-properties fo:margin-top="0cm" fo:margin-bottom="0cm" style:contextual-spacing="false"/>
    </style:style>
    <style:style style:name="P78" style:family="paragraph" style:parent-style-name="Text_20_body" style:list-style-name="L36"/>
    <style:style style:name="P79" style:family="paragraph" style:parent-style-name="Text_20_body" style:list-style-name="L36">
      <style:paragraph-properties fo:margin-top="0cm" fo:margin-bottom="0cm" style:contextual-spacing="false"/>
    </style:style>
    <style:style style:name="P80" style:family="paragraph" style:parent-style-name="Text_20_body" style:list-style-name="L37"/>
    <style:style style:name="P81" style:family="paragraph" style:parent-style-name="Text_20_body" style:list-style-name="L37">
      <style:paragraph-properties fo:margin-top="0cm" fo:margin-bottom="0cm" style:contextual-spacing="false"/>
    </style:style>
    <style:style style:name="P82" style:family="paragraph" style:parent-style-name="Text_20_body" style:list-style-name="L38"/>
    <style:style style:name="P83" style:family="paragraph" style:parent-style-name="Text_20_body" style:list-style-name="L38">
      <style:paragraph-properties fo:margin-top="0cm" fo:margin-bottom="0cm" style:contextual-spacing="false"/>
    </style:style>
    <style:style style:name="P84" style:family="paragraph" style:parent-style-name="Text_20_body" style:list-style-name="L39"/>
    <style:style style:name="P85" style:family="paragraph" style:parent-style-name="Text_20_body" style:list-style-name="L39">
      <style:paragraph-properties fo:margin-top="0cm" fo:margin-bottom="0cm" style:contextual-spacing="false"/>
    </style:style>
    <style:style style:name="P86" style:family="paragraph" style:parent-style-name="Text_20_body" style:list-style-name="L40"/>
    <style:style style:name="P87" style:family="paragraph" style:parent-style-name="Text_20_body" style:list-style-name="L40">
      <style:paragraph-properties fo:margin-top="0cm" fo:margin-bottom="0cm" style:contextual-spacing="false"/>
    </style:style>
    <style:style style:name="P88" style:family="paragraph" style:parent-style-name="Text_20_body" style:list-style-name="L41"/>
    <style:style style:name="P89" style:family="paragraph" style:parent-style-name="Text_20_body" style:list-style-name="L41">
      <style:paragraph-properties fo:margin-top="0cm" fo:margin-bottom="0cm" style:contextual-spacing="false"/>
    </style:style>
    <style:style style:name="P90" style:family="paragraph" style:parent-style-name="Text_20_body" style:list-style-name="L42"/>
    <style:style style:name="P91" style:family="paragraph" style:parent-style-name="Text_20_body" style:list-style-name="L42">
      <style:paragraph-properties fo:margin-top="0cm" fo:margin-bottom="0cm" style:contextual-spacing="false"/>
    </style:style>
    <style:style style:name="P92" style:family="paragraph" style:parent-style-name="Text_20_body" style:list-style-name="L43"/>
    <style:style style:name="P93" style:family="paragraph" style:parent-style-name="Text_20_body" style:list-style-name="L44"/>
    <style:style style:name="P94" style:family="paragraph" style:parent-style-name="Text_20_body" style:list-style-name="L45"/>
    <style:style style:name="T1" style:family="text">
      <style:text-properties officeooo:rsid="0006a30a"/>
    </style:style>
    <style:style style:name="T2" style:family="text">
      <style:text-properties officeooo:rsid="00082243"/>
    </style:style>
    <style:style style:name="T3" style:family="text">
      <style:text-properties officeooo:rsid="000934e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Datasets e Fontes de Dados do Sistema EcoSense</text:span></text:h>
      <text:h text:style-name="Heading_20_2" text:outline-level="2"><text:span text:style-name="Strong_20_Emphasis">1. Introdução</text:span></text:h>
      <text:p text:style-name="Text_20_body">Para o funcionamento do EcoSense, assim como de qualquer modelo baseado em Large Language Models (LLMs), é essencial a utilização de um conjunto de dados (dataset) robusto, confiável e continuamente atualizado. Este dataset constitui a principal fonte de conhecimento do sistema, permitindo que o modelo, após processo de fine-tuning, analise informações, identifique padrões históricos e produza inferências sobre impactos económicos, especialmente no contexto angolano.</text:p>
      <text:p text:style-name="Text_20_body">O objetivo central é transformar dados não estruturados — como notícias e conteúdos digitais — em inteligência acionável, possibilitando:</text:p>
      <text:list xml:id="list1072857986" text:style-name="L15">
        <text:list-item>
          <text:p text:style-name="P37">a identificação de padrões de repetição; </text:p>
        </text:list-item>
        <text:list-item>
          <text:p text:style-name="P37">a análise de impacto económico; </text:p>
        </text:list-item>
        <text:list-item>
          <text:p text:style-name="P37">a geração de previsões; </text:p>
        </text:list-item>
        <text:list-item>
          <text:p text:style-name="P36">a առաջարկação de soluções com base em fundamentos estatísticos, económicos e históricos. </text:p>
        </text:list-item>
      </text:list>
      <text:p text:style-name="Text_20_body">Após análise das principais fontes disponíveis, foram identificados os seguintes conjuntos de dados como os mais adequados para suportar o sistema.</text:p>
      <text:p text:style-name="Horizontal_20_Line"/>
      <text:h text:style-name="Heading_20_2" text:outline-level="2"><text:span text:style-name="Strong_20_Emphasis">2. Classificação das Fontes de Dados</text:span></text:h>
      <text:h text:style-name="Heading_20_3" text:outline-level="3"><text:span text:style-name="Strong_20_Emphasis">2.1 Agregadores Globais de Notícias (Crítico)</text:span></text:h>
      <text:p text:style-name="Text_20_body">Os agregadores globais são fundamentais para garantir cobertura ampla, diversidade de fontes e acesso a dados em tempo quase real.</text:p>
      <text:p text:style-name="Text_20_body">Principais fontes:</text:p>
      <text:list xml:id="list3872910200" text:style-name="L16">
        <text:list-item>
          <text:p text:style-name="P39">GDELT </text:p>
        </text:list-item>
        <text:list-item>
          <text:p text:style-name="P38">NewsAPI </text:p>
        </text:list-item>
      </text:list>
      <text:p text:style-name="Text_20_body">Contributo para o sistema:</text:p>
      <text:list xml:id="list2194846151" text:style-name="L17">
        <text:list-item>
          <text:p text:style-name="P41">acesso a milhares de notícias por minuto; </text:p>
        </text:list-item>
        <text:list-item>
          <text:p text:style-name="P41">disponibilização de eventos estruturados; </text:p>
        </text:list-item>
        <text:list-item>
          <text:p text:style-name="P41">metadados como localização, entidades e, em alguns casos, análise de sentimento; </text:p>
        </text:list-item>
        <text:list-item>
          <text:p text:style-name="P40">cobertura global essencial para deteção de eventos com impacto indireto em Angola. </text:p>
        </text:list-item>
      </text:list>
      <text:p text:style-name="Horizontal_20_Line"/>
      <text:h text:style-name="Heading_20_3" text:outline-level="3"><text:span text:style-name="Strong_20_Emphasis">2.2 Redes Sociais (Alta Prioridade)</text:span></text:h>
      <text:p text:style-name="Text_20_body">As redes sociais são uma fonte crítica de informação em tempo real, frequentemente antecipando eventos reportados pela mídia tradicional.</text:p>
      <text:p text:style-name="Text_20_body"><text:soft-page-break/>Principais fontes:</text:p>
      <text:list xml:id="list1175826942" text:style-name="L18">
        <text:list-item>
          <text:p text:style-name="P43">Twitter (X) (API oficial) </text:p>
        </text:list-item>
        <text:list-item>
          <text:p text:style-name="P42">Reddit (opcional) </text:p>
        </text:list-item>
      </text:list>
      <text:p text:style-name="Text_20_body">Contributo para o sistema:</text:p>
      <text:list xml:id="list1298711960" text:style-name="L19">
        <text:list-item>
          <text:p text:style-name="P45">deteção precoce de eventos económicos e geopolíticos; </text:p>
        </text:list-item>
        <text:list-item>
          <text:p text:style-name="P45">análise de sentimento coletivo (market sentiment); </text:p>
        </text:list-item>
        <text:list-item>
          <text:p text:style-name="P45">identificação de tendências emergentes; </text:p>
        </text:list-item>
        <text:list-item>
          <text:p text:style-name="P44">suporte à análise de impacto imediato no mercado. </text:p>
        </text:list-item>
      </text:list>
      <text:p text:style-name="Horizontal_20_Line"/>
      <text:h text:style-name="Heading_20_3" text:outline-level="3"><text:span text:style-name="Strong_20_Emphasis">2.3 Dados Económicos Estruturados</text:span></text:h>
      <text:p text:style-name="Text_20_body">Essenciais para validar e contextualizar as inferências do modelo, permitindo a ligação entre eventos e indicadores macroeconómicos.</text:p>
      <text:p text:style-name="Text_20_body">Principais fontes:</text:p>
      <text:list xml:id="list3931885642" text:style-name="L20">
        <text:list-item>
          <text:p text:style-name="P47">Fundo Monetário Internacional </text:p>
        </text:list-item>
        <text:list-item>
          <text:p text:style-name="P46">Banco Mundial </text:p>
        </text:list-item>
      </text:list>
      <text:p text:style-name="Text_20_body">Contributo para o sistema:</text:p>
      <text:list xml:id="list3074597812" text:style-name="L21">
        <text:list-item>
          <text:p text:style-name="P49">indicadores como PIB, inflação, dívida pública e taxas de câmbio; </text:p>
        </text:list-item>
        <text:list-item>
          <text:p text:style-name="P49">séries temporais históricas para modelação preditiva; </text:p>
        </text:list-item>
        <text:list-item>
          <text:p text:style-name="P48">base quantitativa para validação de análises qualitativas. </text:p>
        </text:list-item>
      </text:list>
      <text:p text:style-name="Horizontal_20_Line"/>
      <text:h text:style-name="Heading_20_3" text:outline-level="3"><text:span text:style-name="Strong_20_Emphasis">2.4 Dados de Commodities e Energia</text:span></text:h>
      <text:p text:style-name="Text_20_body">Dado o forte peso do setor petrolífero na economia angolana, estes dados são críticos para a avaliação de impacto económico.</text:p>
      <text:p text:style-name="Text_20_body">Principais fontes:</text:p>
      <text:list xml:id="list234352985" text:style-name="L22">
        <text:list-item>
          <text:p text:style-name="P51">Brent Crude Oil </text:p>
        </text:list-item>
        <text:list-item>
          <text:p text:style-name="P50">dados globais de energia e matérias-primas </text:p>
        </text:list-item>
      </text:list>
      <text:p text:style-name="Text_20_body">Contributo para o sistema:</text:p>
      <text:list xml:id="list3857128638" text:style-name="L23">
        <text:list-item>
          <text:p text:style-name="P53">monitorização do preço do petróleo em tempo real; </text:p>
        </text:list-item>
        <text:list-item>
          <text:p text:style-name="P53">análise da relação entre choques externos e receitas nacionais; </text:p>
        </text:list-item>
        <text:list-item>
          <text:p text:style-name="P52">suporte a modelos de previsão macroeconómica. </text:p>
        </text:list-item>
      </text:list>
      <text:p text:style-name="Horizontal_20_Line"/>
      <text:h text:style-name="Heading_20_3" text:outline-level="3"><text:span text:style-name="Strong_20_Emphasis">2.5 Fontes de Notícias Financeiras de Alta Qualidade (Tier 1)</text:span></text:h>
      <text:p text:style-name="Text_20_body">Estas fontes representam o padrão internacional em qualidade de informação para análise económica e financeira.</text:p>
      <text:p text:style-name="Text_20_body">Principais fontes:</text:p>
      <text:list xml:id="list536503848" text:style-name="L24">
        <text:list-item>
          <text:p text:style-name="P55"><text:soft-page-break/>Reuters </text:p>
        </text:list-item>
        <text:list-item>
          <text:p text:style-name="P54">Bloomberg </text:p>
        </text:list-item>
      </text:list>
      <text:p text:style-name="Text_20_body">Contributo para o sistema:</text:p>
      <text:list xml:id="list1634620550" text:style-name="L25">
        <text:list-item>
          <text:p text:style-name="P57">cobertura fiável e rápida de eventos globais; </text:p>
        </text:list-item>
        <text:list-item>
          <text:p text:style-name="P57">elevado rigor editorial; </text:p>
        </text:list-item>
        <text:list-item>
          <text:p text:style-name="P56">utilização frequente em sistemas profissionais de análise financeira e modelos de NLP. </text:p>
        </text:list-item>
      </text:list>
      <text:p text:style-name="Horizontal_20_Line"/>
      <text:h text:style-name="Heading_20_3" text:outline-level="3"><text:span text:style-name="Strong_20_Emphasis">2.6 Fontes Locais (Contexto Angolano)</text:span></text:h>
      <text:p text:style-name="Text_20_body">Essenciais para contextualizar os impactos globais no cenário nacional.</text:p>
      <text:p text:style-name="Text_20_body">Principais fontes:</text:p>
      <text:list xml:id="list1757595740" text:style-name="L26">
        <text:list-item>
          <text:p text:style-name="P59">Jornal de Angola </text:p>
        </text:list-item>
        <text:list-item>
          <text:p text:style-name="P59">Expansão </text:p>
        </text:list-item>
        <text:list-item>
          <text:p text:style-name="P58">Governo de Angola </text:p>
        </text:list-item>
      </text:list>
      <text:p text:style-name="Text_20_body">Contributo para o sistema:</text:p>
      <text:list xml:id="list2889239918" text:style-name="L27">
        <text:list-item>
          <text:p text:style-name="P61">cobertura de eventos internos; </text:p>
        </text:list-item>
        <text:list-item>
          <text:p text:style-name="P61">políticas públicas e decisões governamentais; </text:p>
        </text:list-item>
        <text:list-item>
          <text:p text:style-name="P60">contexto económico local necessário para interpretação dos dados globais. </text:p>
        </text:list-item>
      </text:list>
      <text:p text:style-name="Horizontal_20_Line"/>
      <text:h text:style-name="Heading_20_2" text:outline-level="2"><text:span text:style-name="Strong_20_Emphasis">3. Arquitetura Recomendada de Integração de Dados</text:span></text:h>
      <text:p text:style-name="Text_20_body">Para maximizar a eficiência e a qualidade das análises, recomenda-se uma arquitetura em múltiplas camadas:</text:p>
      <text:h text:style-name="Heading_20_3" text:outline-level="3"><text:span text:style-name="Strong_20_Emphasis">Camada 1 – Dados Locais</text:span></text:h>
      <text:list xml:id="list1093034499" text:style-name="L28">
        <text:list-item>
          <text:p text:style-name="P63">Fontes angolanas (notícias e comunicados oficiais) </text:p>
        </text:list-item>
        <text:list-item>
          <text:p text:style-name="P62">Função: contextualização nacional </text:p>
        </text:list-item>
      </text:list>
      <text:h text:style-name="Heading_20_3" text:outline-level="3"><text:span text:style-name="Strong_20_Emphasis">Camada 2 – Dados Globais</text:span></text:h>
      <text:list xml:id="list2930017151" text:style-name="L29">
        <text:list-item>
          <text:p text:style-name="P65">Agregadores e mídia internacional </text:p>
        </text:list-item>
        <text:list-item>
          <text:p text:style-name="P64">Função: deteção de eventos externos relevantes </text:p>
        </text:list-item>
      </text:list>
      <text:h text:style-name="Heading_20_3" text:outline-level="3"><text:span text:style-name="Strong_20_Emphasis">Camada 3 – Dados em Tempo Real</text:span></text:h>
      <text:list xml:id="list1899030894" text:style-name="L30">
        <text:list-item>
          <text:p text:style-name="P67">Redes sociais </text:p>
        </text:list-item>
        <text:list-item>
          <text:p text:style-name="P66">Função: antecipação de eventos e análise de sentimento </text:p>
        </text:list-item>
      </text:list>
      <text:h text:style-name="Heading_20_3" text:outline-level="3"><text:span text:style-name="Strong_20_Emphasis">Camada 4 – Dados Económicos Estruturados</text:span></text:h>
      <text:list xml:id="list3252296314" text:style-name="L31">
        <text:list-item>
          <text:p text:style-name="P69">Indicadores macroeconómicos e commodities </text:p>
        </text:list-item>
        <text:list-item>
          <text:p text:style-name="P68">Função: validação, modelação e previsão </text:p>
        </text:list-item>
      </text:list>
      <text:p text:style-name="Horizontal_20_Line"/>
      <text:h text:style-name="Heading_20_2" text:outline-level="2"><text:soft-page-break/><text:span text:style-name="Strong_20_Emphasis">4. Considerações Estratégicas</text:span></text:h>
      <text:p text:style-name="Text_20_body">A eficácia do EcoSense dependerá não apenas da qualidade das fontes, mas sobretudo da capacidade de:</text:p>
      <text:list xml:id="list1620497612" text:style-name="L32">
        <text:list-item>
          <text:p text:style-name="P71">filtrar informação relevante; </text:p>
        </text:list-item>
        <text:list-item>
          <text:p text:style-name="P71">integrar dados heterogéneos; </text:p>
        </text:list-item>
        <text:list-item>
          <text:p text:style-name="P71">extrair conhecimento estruturado; </text:p>
        </text:list-item>
        <text:list-item>
          <text:p text:style-name="P70">correlacionar eventos globais com impactos locais. </text:p>
        </text:list-item>
      </text:list>
      <text:p text:style-name="Text_20_body">A combinação de notícias, dados sociais e indicadores económicos constitui uma abordagem híbrida que posiciona o sistema ao nível de soluções internacionais avançadas.</text:p>
      <text:p text:style-name="Horizontal_20_Line"/>
      <text:h text:style-name="Heading_20_2" text:outline-level="2"><text:span text:style-name="Strong_20_Emphasis">5. Conclusão</text:span></text:h>
      <text:p text:style-name="Text_20_body">A construção de um dataset robusto para o EcoSense exige a integração de múltiplas fontes complementares, combinando:</text:p>
      <text:list xml:id="list3755849414" text:style-name="L33">
        <text:list-item>
          <text:p text:style-name="P73">dados locais e globais; </text:p>
        </text:list-item>
        <text:list-item>
          <text:p text:style-name="P73">informação estruturada e não estruturada; </text:p>
        </text:list-item>
        <text:list-item>
          <text:p text:style-name="P72">fontes históricas e em tempo real. </text:p>
        </text:list-item>
      </text:list>
      <text:p text:style-name="Text_20_body">Esta abordagem permitirá desenvolver um sistema capaz de fornecer análises económicas precisas, previsões fundamentadas e suporte eficaz à tomada de decisão no contexto angolano e internaciona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" text:outline-level="1"><text:soft-page-break/><text:span text:style-name="Strong_20_Emphasis">6. Fontes de Dados e Acesso (Links e APIs)</text:span></text:h>
      <text:h text:style-name="Heading_20_2" text:outline-level="2"><text:span text:style-name="Strong_20_Emphasis">6.1 Agregadores Globais de Notícias</text:span></text:h>
      <text:h text:style-name="Heading_20_3" text:outline-level="3"><text:span text:style-name="Strong_20_Emphasis">GDELT</text:span></text:h>
      <text:list xml:id="list3095421193" text:style-name="L34">
        <text:list-item>
          <text:p text:style-name="P75">Website:<text:line-break/><text:a xlink:type="simple" xlink:href="https://www.gdeltproject.org/data.html?utm_source=chatgpt.com" office:target-frame-name="_new" xlink:show="replace" text:style-name="Internet_20_link" text:visited-style-name="Visited_20_Internet_20_Link">Acessar plataforma GDELT</text:a> </text:p>
        </text:list-item>
        <text:list-item>
          <text:p text:style-name="P74">API (Documentação):<text:line-break/><text:a xlink:type="simple" xlink:href="https://docs.gdeltcloud.com/api-reference/v2?utm_source=chatgpt.com" office:target-frame-name="_new" xlink:show="replace" text:style-name="Internet_20_link" text:visited-style-name="Visited_20_Internet_20_Link">Documentação da API GDELT v2</text:a> </text:p>
        </text:list-item>
      </text:list>
      <text:p text:style-name="Text_20_body"><text:span text:style-name="Strong_20_Emphasis">Descrição:</text:span><text:line-break/>Base de dados global que monitora notícias em múltiplos idiomas e converte-as em eventos estruturados com métricas como relevância e impacto. </text:p>
      <text:p text:style-name="Horizontal_20_Line"/>
      <text:h text:style-name="Heading_20_3" text:outline-level="3"><text:span text:style-name="Strong_20_Emphasis">NewsAPI</text:span></text:h>
      <text:list xml:id="list950967734" text:style-name="L35">
        <text:list-item>
          <text:p text:style-name="P77">Website:<text:line-break/><text:a xlink:type="simple" xlink:href="https://newsapi.org/?utm_source=chatgpt.com" office:target-frame-name="_new" xlink:show="replace" text:style-name="Internet_20_link" text:visited-style-name="Visited_20_Internet_20_Link">Acessar NewsAPI</text:a> </text:p>
        </text:list-item>
        <text:list-item>
          <text:p text:style-name="P76">API (Documentação):<text:line-break/><text:a xlink:type="simple" xlink:href="https://newsapi.org/docs/get-started?utm_source=chatgpt.com" office:target-frame-name="_new" xlink:show="replace" text:style-name="Internet_20_link" text:visited-style-name="Visited_20_Internet_20_Link">Documentação oficial da NewsAPI</text:a> </text:p>
        </text:list-item>
      </text:list>
      <text:p text:style-name="Text_20_body"><text:span text:style-name="Strong_20_Emphasis">Descrição:</text:span><text:line-break/>API REST que permite pesquisar e filtrar notícias de mais de 150.000 fontes globais em tempo quase real. </text:p>
      <text:p text:style-name="Horizontal_20_Line"/>
      <text:h text:style-name="Heading_20_2" text:outline-level="2"><text:span text:style-name="Strong_20_Emphasis">6.2 Redes Sociais (Tempo Real)</text:span></text:h>
      <text:h text:style-name="Heading_20_3" text:outline-level="3"><text:span text:style-name="Strong_20_Emphasis">Twitter (X)</text:span></text:h>
      <text:list xml:id="list2606834209" text:style-name="L36">
        <text:list-item>
          <text:p text:style-name="P79">Website:<text:line-break/><text:a xlink:type="simple" xlink:href="https://x.com/" office:target-frame-name="_new" xlink:show="replace" text:style-name="Internet_20_link" text:visited-style-name="Visited_20_Internet_20_Link">https://x.com</text:a> </text:p>
        </text:list-item>
        <text:list-item>
          <text:p text:style-name="P78">API (Developer Platform):<text:line-break/><text:a xlink:type="simple" xlink:href="https://developer.x.com/" office:target-frame-name="_new" xlink:show="replace" text:style-name="Internet_20_link" text:visited-style-name="Visited_20_Internet_20_Link">https://developer.x.com</text:a> </text:p>
        </text:list-item>
      </text:list>
      <text:p text:style-name="Text_20_body"><text:span text:style-name="Strong_20_Emphasis">Descrição:</text:span><text:line-break/>Fonte essencial para deteção precoce de eventos e análise de sentimento em tempo real.</text:p>
      <text:p text:style-name="Horizontal_20_Line"/>
      <text:h text:style-name="Heading_20_3" text:outline-level="3"><text:span text:style-name="Strong_20_Emphasis">Reddit</text:span></text:h>
      <text:list xml:id="list1139515824" text:style-name="L37">
        <text:list-item>
          <text:p text:style-name="P81">Website:<text:line-break/><text:a xlink:type="simple" xlink:href="https://www.reddit.com/" office:target-frame-name="_new" xlink:show="replace" text:style-name="Internet_20_link" text:visited-style-name="Visited_20_Internet_20_Link">https://www.reddit.com</text:a> </text:p>
        </text:list-item>
        <text:list-item>
          <text:p text:style-name="P80">API (Documentação):<text:line-break/><text:a xlink:type="simple" xlink:href="https://www.reddit.com/dev/api/" office:target-frame-name="_new" xlink:show="replace" text:style-name="Internet_20_link" text:visited-style-name="Visited_20_Internet_20_Link">https://www.reddit.com/dev/api/</text:a> </text:p>
        </text:list-item>
      </text:list>
      <text:p text:style-name="Text_20_body"><text:soft-page-break/><text:span text:style-name="Strong_20_Emphasis">Descrição:</text:span><text:line-break/>Plataforma útil para análise de tendências, discussões económicas e perceção pública.</text:p>
      <text:p text:style-name="Horizontal_20_Line"/>
      <text:h text:style-name="Heading_20_2" text:outline-level="2"><text:span text:style-name="Strong_20_Emphasis">6.3 Dados Económicos Estruturados</text:span></text:h>
      <text:h text:style-name="Heading_20_3" text:outline-level="3"><text:span text:style-name="Strong_20_Emphasis">Fundo Monetário Internacional</text:span></text:h>
      <text:list xml:id="list2731471039" text:style-name="L38">
        <text:list-item>
          <text:p text:style-name="P83">Website:<text:line-break/><text:a xlink:type="simple" xlink:href="https://www.imf.org/" office:target-frame-name="_new" xlink:show="replace" text:style-name="Internet_20_link" text:visited-style-name="Visited_20_Internet_20_Link">https://www.imf.org</text:a> </text:p>
        </text:list-item>
        <text:list-item>
          <text:p text:style-name="P83">API (Data API):<text:line-break/><text:a xlink:type="simple" xlink:href="https://data.imf.org/en/Resource-Pages/IMF-API?utm_source=chatgpt.com" office:target-frame-name="_new" xlink:show="replace" text:style-name="Internet_20_link" text:visited-style-name="Visited_20_Internet_20_Link">IMF Data API</text:a> </text:p>
        </text:list-item>
        <text:list-item>
          <text:p text:style-name="P82">DataMapper API:<text:line-break/>https://www.imf.org/external/datamapper/api/v1 </text:p>
        </text:list-item>
      </text:list>
      <text:p text:style-name="Text_20_body"><text:span text:style-name="Strong_20_Emphasis">Descrição:</text:span><text:line-break/>Fornece dados macroeconómicos como inflação, dívida pública e crescimento económico. </text:p>
      <text:p text:style-name="Horizontal_20_Line"/>
      <text:h text:style-name="Heading_20_3" text:outline-level="3"><text:span text:style-name="Strong_20_Emphasis">Banco Mundial</text:span></text:h>
      <text:list xml:id="list445253758" text:style-name="L39">
        <text:list-item>
          <text:p text:style-name="P85">Website:<text:line-break/><text:a xlink:type="simple" xlink:href="https://www.worldbank.org/" office:target-frame-name="_new" xlink:show="replace" text:style-name="Internet_20_link" text:visited-style-name="Visited_20_Internet_20_Link">https://www.worldbank.org</text:a> </text:p>
        </text:list-item>
        <text:list-item>
          <text:p text:style-name="P85">API (Indicadores):<text:line-break/><text:a xlink:type="simple" xlink:href="https://datahelpdesk.worldbank.org/knowledgebase/articles/889392-about-the-indicators-api-documentation?utm_source=chatgpt.com" office:target-frame-name="_new" xlink:show="replace" text:style-name="Internet_20_link" text:visited-style-name="Visited_20_Internet_20_Link">World Bank Indicators API</text:a> </text:p>
        </text:list-item>
        <text:list-item>
          <text:p text:style-name="P84">Endpoint base:<text:line-break/>https://api.worldbank.org/v2/ </text:p>
        </text:list-item>
      </text:list>
      <text:p text:style-name="Text_20_body"><text:span text:style-name="Strong_20_Emphasis">Descrição:</text:span><text:line-break/>Disponibiliza mais de 16.000 indicadores económicos e sociais com séries históricas extensas. </text:p>
      <text:p text:style-name="Horizontal_20_Line"/>
      <text:h text:style-name="Heading_20_2" text:outline-level="2"><text:span text:style-name="Strong_20_Emphasis">6.4 Dados de Commodities e Energia</text:span></text:h>
      <text:h text:style-name="Heading_20_3" text:outline-level="3"><text:span text:style-name="Strong_20_Emphasis">Brent Crude Oil</text:span></text:h>
      <text:list xml:id="list2450261863" text:style-name="L40">
        <text:list-item>
          <text:p text:style-name="P87">Website (dados de referência):<text:line-break/><text:a xlink:type="simple" xlink:href="https://www.investing.com/commodities/brent-oil" office:target-frame-name="_new" xlink:show="replace" text:style-name="Internet_20_link" text:visited-style-name="Visited_20_Internet_20_Link">https://www.investing.com/commodities/brent-oil</text:a> </text:p>
        </text:list-item>
        <text:list-item>
          <text:p text:style-name="P86">API (exemplo alternativo):<text:line-break/><text:a xlink:type="simple" xlink:href="https://api.eia.gov/" office:target-frame-name="_new" xlink:show="replace" text:style-name="Internet_20_link" text:visited-style-name="Visited_20_Internet_20_Link">https://api.eia.gov</text:a> </text:p>
        </text:list-item>
      </text:list>
      <text:p text:style-name="Text_20_body"><text:span text:style-name="Strong_20_Emphasis">Descrição:</text:span><text:line-break/>Indicador crítico para a economia angolana, permitindo análise direta do impacto de variações no preço do petróleo.</text:p>
      <text:p text:style-name="Horizontal_20_Line"/>
      <text:h text:style-name="Heading_20_2" text:outline-level="2"><text:soft-page-break/><text:span text:style-name="Strong_20_Emphasis">6.5 Fontes de Notícias Financeiras (Alta Qualidade)</text:span></text:h>
      <text:h text:style-name="Heading_20_3" text:outline-level="3"><text:span text:style-name="Strong_20_Emphasis">Reuters</text:span></text:h>
      <text:list xml:id="list1631270242" text:style-name="L41">
        <text:list-item>
          <text:p text:style-name="P89">Website:<text:line-break/><text:a xlink:type="simple" xlink:href="https://www.reuters.com/" office:target-frame-name="_new" xlink:show="replace" text:style-name="Internet_20_link" text:visited-style-name="Visited_20_Internet_20_Link">https://www.reuters.com</text:a> </text:p>
        </text:list-item>
        <text:list-item>
          <text:p text:style-name="P88">API (via parceiros / datasets):<text:line-break/><text:a xlink:type="simple" xlink:href="https://www.reuters.com/technology" office:target-frame-name="_new" xlink:show="replace" text:style-name="Internet_20_link" text:visited-style-name="Visited_20_Internet_20_Link">https://www.reuters.com/technology</text:a> </text:p>
        </text:list-item>
      </text:list>
      <text:p text:style-name="Text_20_body"><text:span text:style-name="Strong_20_Emphasis">Descrição:</text:span><text:line-break/>Fonte de notícias financeiras altamente confiável e amplamente utilizada em sistemas profissionais.</text:p>
      <text:p text:style-name="Horizontal_20_Line"/>
      <text:h text:style-name="Heading_20_3" text:outline-level="3"><text:span text:style-name="Strong_20_Emphasis">Bloomberg</text:span></text:h>
      <text:list xml:id="list387291102" text:style-name="L42">
        <text:list-item>
          <text:p text:style-name="P91">Website:<text:line-break/><text:a xlink:type="simple" xlink:href="https://www.bloomberg.com/" office:target-frame-name="_new" xlink:show="replace" text:style-name="Internet_20_link" text:visited-style-name="Visited_20_Internet_20_Link">https://www.bloomberg.com</text:a> </text:p>
        </text:list-item>
        <text:list-item>
          <text:p text:style-name="P90">API (Bloomberg Terminal / BLPAPI):<text:line-break/><text:a xlink:type="simple" xlink:href="https://www.bloomberg.com/professional/support/api-library/" office:target-frame-name="_new" xlink:show="replace" text:style-name="Internet_20_link" text:visited-style-name="Visited_20_Internet_20_Link">https://www.bloomberg.com/professional/support/api-library/</text:a> </text:p>
        </text:list-item>
      </text:list>
      <text:p text:style-name="Text_20_body"><text:span text:style-name="Strong_20_Emphasis">Descrição:</text:span><text:line-break/>Plataforma premium com dados financeiros, amplamente utilizada por instituições financeiras globais.</text:p>
      <text:p text:style-name="Horizontal_20_Line"/>
      <text:h text:style-name="Heading_20_2" text:outline-level="2"><text:span text:style-name="Strong_20_Emphasis">6.6 Fontes Locais (Contexto Angolano)</text:span></text:h>
      <text:h text:style-name="Heading_20_3" text:outline-level="3"><text:span text:style-name="Strong_20_Emphasis">Jornal de Angola</text:span></text:h>
      <text:list xml:id="list2589235009" text:style-name="L43">
        <text:list-item>
          <text:p text:style-name="P92">Website:<text:line-break/>https://www.jornaldeangola.ao </text:p>
        </text:list-item>
      </text:list>
      <text:p text:style-name="Text_20_body"><text:span text:style-name="Strong_20_Emphasis">Descrição:</text:span><text:line-break/>Fonte oficial de notícias nacionais, com forte cobertura política e económica.</text:p>
      <text:p text:style-name="Horizontal_20_Line"/>
      <text:h text:style-name="Heading_20_3" text:outline-level="3"><text:span text:style-name="Strong_20_Emphasis">Expansão</text:span></text:h>
      <text:list xml:id="list685841385" text:style-name="L44">
        <text:list-item>
          <text:p text:style-name="P93">Website:<text:line-break/>https://expansao.co.ao </text:p>
        </text:list-item>
      </text:list>
      <text:p text:style-name="Text_20_body"><text:span text:style-name="Strong_20_Emphasis">Descrição:</text:span><text:line-break/>Especializado em economia, negócios e setor financeiro angolano.</text:p>
      <text:p text:style-name="Horizontal_20_Line"/>
      <text:p text:style-name="Text_20_body"/>
      <text:p text:style-name="Text_20_body"/>
      <text:h text:style-name="Heading_20_3" text:outline-level="3"><text:soft-page-break/><text:span text:style-name="Strong_20_Emphasis">Governo de Angola</text:span></text:h>
      <text:list xml:id="list3187580695" text:style-name="L45">
        <text:list-item>
          <text:p text:style-name="P94">Website:<text:line-break/><text:a xlink:type="simple" xlink:href="https://www.governo.gov.ao/" office:target-frame-name="_new" xlink:show="replace" text:style-name="Internet_20_link" text:visited-style-name="Visited_20_Internet_20_Link">https://www.governo.gov.ao</text:a> </text:p>
        </text:list-item>
      </text:list>
      <text:p text:style-name="Text_20_body"><text:span text:style-name="Strong_20_Emphasis">Descrição:</text:span><text:line-break/>Fonte primária de comunicados oficiais e políticas públicas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8:21:49.151303243</meta:creation-date>
    <dc:date>2026-05-05T00:31:27.171334203</dc:date>
    <meta:editing-duration>PT56S</meta:editing-duration>
    <meta:editing-cycles>1</meta:editing-cycles>
    <meta:document-statistic meta:table-count="0" meta:image-count="0" meta:object-count="0" meta:page-count="8" meta:paragraph-count="148" meta:word-count="1076" meta:character-count="7768" meta:non-whitespace-character-count="6830"/>
    <meta:generator>LibreOffice/7.3.7.2$Linux_X86_64 LibreOffice_project/30$Build-2</meta:generator>
  </office:meta>
</office:document-meta>
</file>