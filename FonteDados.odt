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4eb4e" officeooo:paragraph-rsid="001bf025"/>
    </style:style>
    <style:style style:name="P2" style:family="paragraph" style:parent-style-name="Heading_20_2">
      <style:text-properties officeooo:paragraph-rsid="001bf025"/>
    </style:style>
    <style:style style:name="P3" style:family="paragraph" style:parent-style-name="Heading_20_3">
      <style:text-properties officeooo:paragraph-rsid="001bf025"/>
    </style:style>
    <style:style style:name="P4" style:family="paragraph" style:parent-style-name="Horizontal_20_Line">
      <style:text-properties officeooo:paragraph-rsid="001bf025"/>
    </style:style>
    <style:style style:name="P5" style:family="paragraph" style:parent-style-name="Standard">
      <style:text-properties officeooo:rsid="0004eb4e" officeooo:paragraph-rsid="001bf025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1bf025"/>
    </style:style>
    <style:style style:name="P7" style:family="paragraph" style:parent-style-name="Text_20_body" style:list-style-name="L1">
      <style:text-properties officeooo:paragraph-rsid="001bf025"/>
    </style:style>
    <style:style style:name="P8" style:family="paragraph" style:parent-style-name="Text_20_body" style:list-style-name="L13">
      <style:paragraph-properties fo:margin-top="0cm" fo:margin-bottom="0cm" style:contextual-spacing="false"/>
      <style:text-properties officeooo:paragraph-rsid="001bf025"/>
    </style:style>
    <style:style style:name="P9" style:family="paragraph" style:parent-style-name="Text_20_body" style:list-style-name="L13">
      <style:text-properties officeooo:paragraph-rsid="001bf025"/>
    </style:style>
    <style:style style:name="P10" style:family="paragraph" style:parent-style-name="Text_20_body" style:list-style-name="L14">
      <style:paragraph-properties fo:margin-top="0cm" fo:margin-bottom="0cm" style:contextual-spacing="false"/>
      <style:text-properties officeooo:paragraph-rsid="001bf025"/>
    </style:style>
    <style:style style:name="P11" style:family="paragraph" style:parent-style-name="Text_20_body" style:list-style-name="L14">
      <style:text-properties officeooo:paragraph-rsid="001bf025"/>
    </style:style>
    <style:style style:name="P12" style:family="paragraph" style:parent-style-name="Text_20_body" style:list-style-name="L15">
      <style:paragraph-properties fo:margin-top="0cm" fo:margin-bottom="0cm" style:contextual-spacing="false"/>
      <style:text-properties officeooo:paragraph-rsid="001bf025"/>
    </style:style>
    <style:style style:name="P13" style:family="paragraph" style:parent-style-name="Text_20_body" style:list-style-name="L15">
      <style:text-properties officeooo:paragraph-rsid="001bf025"/>
    </style:style>
    <style:style style:name="P14" style:family="paragraph" style:parent-style-name="Text_20_body" style:list-style-name="L16">
      <style:paragraph-properties fo:margin-top="0cm" fo:margin-bottom="0cm" style:contextual-spacing="false"/>
      <style:text-properties officeooo:paragraph-rsid="001bf025"/>
    </style:style>
    <style:style style:name="P15" style:family="paragraph" style:parent-style-name="Text_20_body" style:list-style-name="L16">
      <style:text-properties officeooo:paragraph-rsid="001bf025"/>
    </style:style>
    <style:style style:name="P16" style:family="paragraph" style:parent-style-name="Text_20_body" style:list-style-name="L17">
      <style:paragraph-properties fo:margin-top="0cm" fo:margin-bottom="0cm" style:contextual-spacing="false"/>
      <style:text-properties officeooo:paragraph-rsid="001bf025"/>
    </style:style>
    <style:style style:name="P17" style:family="paragraph" style:parent-style-name="Text_20_body" style:list-style-name="L17">
      <style:text-properties officeooo:paragraph-rsid="001bf025"/>
    </style:style>
    <style:style style:name="P18" style:family="paragraph" style:parent-style-name="Text_20_body" style:list-style-name="L18">
      <style:paragraph-properties fo:margin-top="0cm" fo:margin-bottom="0cm" style:contextual-spacing="false"/>
      <style:text-properties officeooo:paragraph-rsid="001bf025"/>
    </style:style>
    <style:style style:name="P19" style:family="paragraph" style:parent-style-name="Text_20_body" style:list-style-name="L18">
      <style:text-properties officeooo:paragraph-rsid="001bf025"/>
    </style:style>
    <style:style style:name="P20" style:family="paragraph" style:parent-style-name="Text_20_body" style:list-style-name="L19">
      <style:paragraph-properties fo:margin-top="0cm" fo:margin-bottom="0cm" style:contextual-spacing="false"/>
      <style:text-properties officeooo:paragraph-rsid="001bf025"/>
    </style:style>
    <style:style style:name="P21" style:family="paragraph" style:parent-style-name="Text_20_body" style:list-style-name="L19">
      <style:text-properties officeooo:paragraph-rsid="001bf025"/>
    </style:style>
    <style:style style:name="P22" style:family="paragraph" style:parent-style-name="Text_20_body" style:list-style-name="L20">
      <style:paragraph-properties fo:margin-top="0cm" fo:margin-bottom="0cm" style:contextual-spacing="false"/>
      <style:text-properties officeooo:paragraph-rsid="001bf025"/>
    </style:style>
    <style:style style:name="P23" style:family="paragraph" style:parent-style-name="Text_20_body" style:list-style-name="L20">
      <style:text-properties officeooo:paragraph-rsid="001bf025"/>
    </style:style>
    <style:style style:name="P24" style:family="paragraph" style:parent-style-name="Text_20_body" style:list-style-name="L21">
      <style:text-properties officeooo:paragraph-rsid="001bf025"/>
    </style:style>
    <style:style style:name="P25" style:family="paragraph" style:parent-style-name="Text_20_body" style:list-style-name="L22">
      <style:text-properties officeooo:paragraph-rsid="001bf025"/>
    </style:style>
    <style:style style:name="P26" style:family="paragraph" style:parent-style-name="Text_20_body" style:list-style-name="L23">
      <style:text-properties officeooo:paragraph-rsid="001bf025"/>
    </style:style>
    <style:style style:name="P27" style:family="paragraph" style:parent-style-name="Text_20_body">
      <style:text-properties officeooo:paragraph-rsid="001bf02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6. Fontes de Dados e Acesso (Links e APIs)</text:span></text:h>
      <text:h text:style-name="P2" text:outline-level="2"><text:span text:style-name="Strong_20_Emphasis">6.1 Agregadores Globais de Notícias</text:span></text:h>
      <text:h text:style-name="P3" text:outline-level="3"><text:span text:style-name="Strong_20_Emphasis">GDELT</text:span></text:h>
      <text:list xml:id="list3095421193" text:style-name="L1">
        <text:list-item>
          <text:p text:style-name="P6">Website:<text:line-break/><text:a xlink:type="simple" xlink:href="https://www.gdeltproject.org/data.html?utm_source=chatgpt.com" office:target-frame-name="_new" xlink:show="replace" text:style-name="Internet_20_link" text:visited-style-name="Visited_20_Internet_20_Link">Acessar plataforma GDELT</text:a> </text:p>
        </text:list-item>
        <text:list-item>
          <text:p text:style-name="P7">API (Documentação):<text:line-break/><text:a xlink:type="simple" xlink:href="https://docs.gdeltcloud.com/api-reference/v2?utm_source=chatgpt.com" office:target-frame-name="_new" xlink:show="replace" text:style-name="Internet_20_link" text:visited-style-name="Visited_20_Internet_20_Link">Documentação da API GDELT v2</text:a> </text:p>
        </text:list-item>
      </text:list>
      <text:p text:style-name="P27"><text:span text:style-name="Strong_20_Emphasis">Descrição:</text:span><text:line-break/>Base de dados global que monitora notícias em múltiplos idiomas e converte-as em eventos estruturados com métricas como relevância e impacto. </text:p>
      <text:p text:style-name="P4"/>
      <text:h text:style-name="P3" text:outline-level="3"><text:span text:style-name="Strong_20_Emphasis">NewsAPI</text:span></text:h>
      <text:list xml:id="list1415646557" text:style-name="L13">
        <text:list-item>
          <text:p text:style-name="P8">Website:<text:line-break/><text:a xlink:type="simple" xlink:href="https://newsapi.org/?utm_source=chatgpt.com" office:target-frame-name="_new" xlink:show="replace" text:style-name="Internet_20_link" text:visited-style-name="Visited_20_Internet_20_Link">Acessar NewsAPI</text:a> </text:p>
        </text:list-item>
        <text:list-item>
          <text:p text:style-name="P9">API (Documentação):<text:line-break/><text:a xlink:type="simple" xlink:href="https://newsapi.org/docs/get-started?utm_source=chatgpt.com" office:target-frame-name="_new" xlink:show="replace" text:style-name="Internet_20_link" text:visited-style-name="Visited_20_Internet_20_Link">Documentação oficial da NewsAPI</text:a> </text:p>
        </text:list-item>
      </text:list>
      <text:p text:style-name="P27"><text:span text:style-name="Strong_20_Emphasis">Descrição:</text:span><text:line-break/>API REST que permite pesquisar e filtrar notícias de mais de 150.000 fontes globais em tempo quase real. </text:p>
      <text:p text:style-name="P4"/>
      <text:h text:style-name="P2" text:outline-level="2"><text:span text:style-name="Strong_20_Emphasis">6.2 Redes Sociais (Tempo Real)</text:span></text:h>
      <text:h text:style-name="P3" text:outline-level="3"><text:span text:style-name="Strong_20_Emphasis">Twitter (X)</text:span></text:h>
      <text:list xml:id="list2062018719" text:style-name="L14">
        <text:list-item>
          <text:p text:style-name="P10">Website:<text:line-break/><text:a xlink:type="simple" xlink:href="https://x.com/" office:target-frame-name="_new" xlink:show="replace" text:style-name="Internet_20_link" text:visited-style-name="Visited_20_Internet_20_Link">https://x.com</text:a> </text:p>
        </text:list-item>
        <text:list-item>
          <text:p text:style-name="P11">API (Developer Platform):<text:line-break/><text:a xlink:type="simple" xlink:href="https://developer.x.com/" office:target-frame-name="_new" xlink:show="replace" text:style-name="Internet_20_link" text:visited-style-name="Visited_20_Internet_20_Link">https://developer.x.com</text:a> </text:p>
        </text:list-item>
      </text:list>
      <text:p text:style-name="P27"><text:span text:style-name="Strong_20_Emphasis">Descrição:</text:span><text:line-break/>Fonte essencial para deteção precoce de eventos e análise de sentimento em tempo real.</text:p>
      <text:p text:style-name="P4"/>
      <text:h text:style-name="P3" text:outline-level="3"><text:span text:style-name="Strong_20_Emphasis">Reddit</text:span></text:h>
      <text:list xml:id="list1868528929" text:style-name="L15">
        <text:list-item>
          <text:p text:style-name="P12">Website:<text:line-break/><text:a xlink:type="simple" xlink:href="https://www.reddit.com/" office:target-frame-name="_new" xlink:show="replace" text:style-name="Internet_20_link" text:visited-style-name="Visited_20_Internet_20_Link">https://www.reddit.com</text:a> </text:p>
        </text:list-item>
        <text:list-item>
          <text:p text:style-name="P13">API (Documentação):<text:line-break/><text:a xlink:type="simple" xlink:href="https://www.reddit.com/dev/api/" office:target-frame-name="_new" xlink:show="replace" text:style-name="Internet_20_link" text:visited-style-name="Visited_20_Internet_20_Link">https://www.reddit.com/dev/api/</text:a> </text:p>
        </text:list-item>
      </text:list>
      <text:p text:style-name="P27"><text:soft-page-break/><text:span text:style-name="Strong_20_Emphasis">Descrição:</text:span><text:line-break/>Plataforma útil para análise de tendências, discussões económicas e perceção pública.</text:p>
      <text:p text:style-name="P4"/>
      <text:h text:style-name="P2" text:outline-level="2"><text:span text:style-name="Strong_20_Emphasis">6.3 Dados Económicos Estruturados</text:span></text:h>
      <text:h text:style-name="P3" text:outline-level="3"><text:span text:style-name="Strong_20_Emphasis">Fundo Monetário Internacional</text:span></text:h>
      <text:list xml:id="list600974481" text:style-name="L16">
        <text:list-item>
          <text:p text:style-name="P14">Website:<text:line-break/><text:a xlink:type="simple" xlink:href="https://www.imf.org/" office:target-frame-name="_new" xlink:show="replace" text:style-name="Internet_20_link" text:visited-style-name="Visited_20_Internet_20_Link">https://www.imf.org</text:a> </text:p>
        </text:list-item>
        <text:list-item>
          <text:p text:style-name="P14">API (Data API):<text:line-break/><text:a xlink:type="simple" xlink:href="https://data.imf.org/en/Resource-Pages/IMF-API?utm_source=chatgpt.com" office:target-frame-name="_new" xlink:show="replace" text:style-name="Internet_20_link" text:visited-style-name="Visited_20_Internet_20_Link">IMF Data API</text:a> </text:p>
        </text:list-item>
        <text:list-item>
          <text:p text:style-name="P15">DataMapper API:<text:line-break/>https://www.imf.org/external/datamapper/api/v1 </text:p>
        </text:list-item>
      </text:list>
      <text:p text:style-name="P27"><text:span text:style-name="Strong_20_Emphasis">Descrição:</text:span><text:line-break/>Fornece dados macroeconómicos como inflação, dívida pública e crescimento económico. </text:p>
      <text:p text:style-name="P4"/>
      <text:h text:style-name="P3" text:outline-level="3"><text:span text:style-name="Strong_20_Emphasis">Banco Mundial</text:span></text:h>
      <text:list xml:id="list724383263" text:style-name="L17">
        <text:list-item>
          <text:p text:style-name="P16">Website:<text:line-break/><text:a xlink:type="simple" xlink:href="https://www.worldbank.org/" office:target-frame-name="_new" xlink:show="replace" text:style-name="Internet_20_link" text:visited-style-name="Visited_20_Internet_20_Link">https://www.worldbank.org</text:a> </text:p>
        </text:list-item>
        <text:list-item>
          <text:p text:style-name="P16">API (Indicadores):<text:line-break/><text:a xlink:type="simple" xlink:href="https://datahelpdesk.worldbank.org/knowledgebase/articles/889392-about-the-indicators-api-documentation?utm_source=chatgpt.com" office:target-frame-name="_new" xlink:show="replace" text:style-name="Internet_20_link" text:visited-style-name="Visited_20_Internet_20_Link">World Bank Indicators API</text:a> </text:p>
        </text:list-item>
        <text:list-item>
          <text:p text:style-name="P17">Endpoint base:<text:line-break/>https://api.worldbank.org/v2/ </text:p>
        </text:list-item>
      </text:list>
      <text:p text:style-name="P27"><text:span text:style-name="Strong_20_Emphasis">Descrição:</text:span><text:line-break/>Disponibiliza mais de 16.000 indicadores económicos e sociais com séries históricas extensas. </text:p>
      <text:p text:style-name="P4"/>
      <text:h text:style-name="P2" text:outline-level="2"><text:span text:style-name="Strong_20_Emphasis">6.4 Dados de Commodities e Energia</text:span></text:h>
      <text:h text:style-name="P3" text:outline-level="3"><text:span text:style-name="Strong_20_Emphasis">Brent Crude Oil</text:span></text:h>
      <text:list xml:id="list4189043384" text:style-name="L18">
        <text:list-item>
          <text:p text:style-name="P18">Website (dados de referência):<text:line-break/><text:a xlink:type="simple" xlink:href="https://www.investing.com/commodities/brent-oil" office:target-frame-name="_new" xlink:show="replace" text:style-name="Internet_20_link" text:visited-style-name="Visited_20_Internet_20_Link">https://www.investing.com/commodities/brent-oil</text:a> </text:p>
        </text:list-item>
        <text:list-item>
          <text:p text:style-name="P19">API (exemplo alternativo):<text:line-break/><text:a xlink:type="simple" xlink:href="https://api.eia.gov/" office:target-frame-name="_new" xlink:show="replace" text:style-name="Internet_20_link" text:visited-style-name="Visited_20_Internet_20_Link">https://api.eia.gov</text:a> </text:p>
        </text:list-item>
      </text:list>
      <text:p text:style-name="P27"><text:span text:style-name="Strong_20_Emphasis">Descrição:</text:span><text:line-break/>Indicador crítico para a economia angolana, permitindo análise direta do impacto de variações no preço do petróleo.</text:p>
      <text:p text:style-name="P4"/>
      <text:h text:style-name="P2" text:outline-level="2"><text:soft-page-break/><text:span text:style-name="Strong_20_Emphasis">6.5 Fontes de Notícias Financeiras (Alta Qualidade)</text:span></text:h>
      <text:h text:style-name="P3" text:outline-level="3"><text:span text:style-name="Strong_20_Emphasis">Reuters</text:span></text:h>
      <text:list xml:id="list3840859379" text:style-name="L19">
        <text:list-item>
          <text:p text:style-name="P20">Website:<text:line-break/><text:a xlink:type="simple" xlink:href="https://www.reuters.com/" office:target-frame-name="_new" xlink:show="replace" text:style-name="Internet_20_link" text:visited-style-name="Visited_20_Internet_20_Link">https://www.reuters.com</text:a> </text:p>
        </text:list-item>
        <text:list-item>
          <text:p text:style-name="P21">API (via parceiros / datasets):<text:line-break/><text:a xlink:type="simple" xlink:href="https://www.reuters.com/technology" office:target-frame-name="_new" xlink:show="replace" text:style-name="Internet_20_link" text:visited-style-name="Visited_20_Internet_20_Link">https://www.reuters.com/technology</text:a> </text:p>
        </text:list-item>
      </text:list>
      <text:p text:style-name="P27"><text:span text:style-name="Strong_20_Emphasis">Descrição:</text:span><text:line-break/>Fonte de notícias financeiras altamente confiável e amplamente utilizada em sistemas profissionais.</text:p>
      <text:p text:style-name="P4"/>
      <text:h text:style-name="P3" text:outline-level="3"><text:span text:style-name="Strong_20_Emphasis">Bloomberg</text:span></text:h>
      <text:list xml:id="list1676974378" text:style-name="L20">
        <text:list-item>
          <text:p text:style-name="P22">Website:<text:line-break/><text:a xlink:type="simple" xlink:href="https://www.bloomberg.com/" office:target-frame-name="_new" xlink:show="replace" text:style-name="Internet_20_link" text:visited-style-name="Visited_20_Internet_20_Link">https://www.bloomberg.com</text:a> </text:p>
        </text:list-item>
        <text:list-item>
          <text:p text:style-name="P23">API (Bloomberg Terminal / BLPAPI):<text:line-break/><text:a xlink:type="simple" xlink:href="https://www.bloomberg.com/professional/support/api-library/" office:target-frame-name="_new" xlink:show="replace" text:style-name="Internet_20_link" text:visited-style-name="Visited_20_Internet_20_Link">https://www.bloomberg.com/professional/support/api-library/</text:a> </text:p>
        </text:list-item>
      </text:list>
      <text:p text:style-name="P27"><text:span text:style-name="Strong_20_Emphasis">Descrição:</text:span><text:line-break/>Plataforma premium com dados financeiros, amplamente utilizada por instituições financeiras globais.</text:p>
      <text:p text:style-name="P4"/>
      <text:h text:style-name="P2" text:outline-level="2"><text:span text:style-name="Strong_20_Emphasis">6.6 Fontes Locais (Contexto Angolano)</text:span></text:h>
      <text:h text:style-name="P3" text:outline-level="3"><text:span text:style-name="Strong_20_Emphasis">Jornal de Angola</text:span></text:h>
      <text:list xml:id="list1539304405" text:style-name="L21">
        <text:list-item>
          <text:p text:style-name="P24">Website:<text:line-break/>https://www.jornaldeangola.ao </text:p>
        </text:list-item>
      </text:list>
      <text:p text:style-name="P27"><text:span text:style-name="Strong_20_Emphasis">Descrição:</text:span><text:line-break/>Fonte oficial de notícias nacionais, com forte cobertura política e económica.</text:p>
      <text:p text:style-name="P4"/>
      <text:h text:style-name="P3" text:outline-level="3"><text:span text:style-name="Strong_20_Emphasis">Expansão</text:span></text:h>
      <text:list xml:id="list1279891661" text:style-name="L22">
        <text:list-item>
          <text:p text:style-name="P25">Website:<text:line-break/>https://expansao.co.ao </text:p>
        </text:list-item>
      </text:list>
      <text:p text:style-name="P27"><text:span text:style-name="Strong_20_Emphasis">Descrição:</text:span><text:line-break/>Especializado em economia, negócios e setor financeiro angolano.</text:p>
      <text:p text:style-name="P4"/>
      <text:p text:style-name="P27"/>
      <text:p text:style-name="P27"/>
      <text:h text:style-name="P3" text:outline-level="3"><text:soft-page-break/><text:span text:style-name="Strong_20_Emphasis">Governo de Angola</text:span></text:h>
      <text:list xml:id="list1313266019" text:style-name="L23">
        <text:list-item>
          <text:p text:style-name="P26">Website:<text:line-break/><text:a xlink:type="simple" xlink:href="https://www.governo.gov.ao/" office:target-frame-name="_new" xlink:show="replace" text:style-name="Internet_20_link" text:visited-style-name="Visited_20_Internet_20_Link">https://www.governo.gov.ao</text:a> </text:p>
        </text:list-item>
      </text:list>
      <text:p text:style-name="P27"><text:span text:style-name="Strong_20_Emphasis">Descrição:</text:span><text:line-break/>Fonte primária de comunicados oficiais e políticas públicas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00:33:27.479441875</meta:creation-date>
    <dc:date>2026-05-05T00:36:07.004435362</dc:date>
    <meta:editing-duration>PT2M44S</meta:editing-duration>
    <meta:editing-cycles>1</meta:editing-cycles>
    <meta:document-statistic meta:table-count="0" meta:image-count="0" meta:object-count="0" meta:page-count="4" meta:paragraph-count="54" meta:word-count="335" meta:character-count="2699" meta:non-whitespace-character-count="2414"/>
    <meta:generator>LibreOffice/7.3.7.2$Linux_X86_64 LibreOffice_project/30$Build-2</meta:generator>
  </office:meta>
</office:document-meta>
</file>